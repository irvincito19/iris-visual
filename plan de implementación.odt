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Quotations" style:list-style-name="L5"/>
    <style:style style:name="P7" style:family="paragraph" style:parent-style-name="Text_20_body" style:list-style-name="L6"/>
    <style:style style:name="T1" style:family="text">
      <style:text-properties fo:font-variant="normal" fo:text-transform="none" fo:color="#cccccc" loext:opacity="100%" fo:font-family="system-ui, Ubuntu, 'Droid Sans', sans-serif" fo:font-size="9.75pt" fo:letter-spacing="normal" fo:font-style="normal" fo:font-weight="normal"/>
    </style:style>
    <style:style style:name="T2" style:family="text">
      <style:text-properties fo:font-variant="normal" fo:text-transform="none" fo:color="#cccccc" loext:opacity="100%" fo:letter-spacing="normal"/>
    </style:style>
    <style:style style:name="T3" style:family="text">
      <style:text-properties style:font-name="Liberation Mono"/>
    </style:style>
    <style:style style:name="T4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la, necesito tres proyectos de landing pages con tailwind para producción que alojaré en mi vps de lightsail, quiero que en el readme de mi proyecto describas como llevarlos al vps y que salgan a internet con caddy (reutilizando el dominio de irisvisual.com usando subdominios) emplearé git para mi control de versiones.</text:span><text:span text:style-name="T2"> </text:span><text:span text:style-name="T1">Un proyecto es de la Marca de mezcal artesanal Admirable (colores negros y dorados ) aquí se busca mostrar lo del proceso del mezcal y recibir futuros clientes compradores.</text:span><text:span text:style-name="T2"> </text:span><text:span text:style-name="T1">Otro proyecto es de un temazcal llamado TOnantzin ubicado en MIahuatlán Oaxaca (colores prehispánicos).</text:span><text:span text:style-name="T2"> </text:span><text:span text:style-name="T1">EL útlimo es de la Marca IRIS VISUAL que es producción audiovisual para negocios (colores azules y naranja)</text:span><text:span text:style-name="T2"> </text:span><text:span text:style-name="T1">El objetivo de las landing pages es direccionar a watsapp mediante un formulario para futuros clientes y compradores de las marcas ya que ese será mi negocio crear landing pages para negocios distintos locales en MIahuatlán de porfirio díaz.</text:span><text:span text:style-name="T2"> </text:span><text:span text:style-name="T1">Neceisto que el código sea legible en español para que yo pueda modificarlo después por favor.</text:span><text:span text:style-name="T2"> </text:span><text:span text:style-name="T1">Mi vps está en lightsail con 2gb de RAM.</text:span></text:p>
      <text:h text:style-name="Heading_20_1" text:outline-level="1"/>
      <text:h text:style-name="Heading_20_1" text:outline-level="1"/>
      <text:h text:style-name="Heading_20_1" text:outline-level="1">Plan de Implementación: Landing Pages y Despliegue con Caddy</text:h>
      <text:p text:style-name="Text_20_body">Este plan detalla la creación de las tres landing pages utilizando Vite + Vanilla HTML + Tailwind CSS (para máxima velocidad y simplicidad) y las instrucciones de despliegue en tu VPS de 2GB usando Caddy para los subdominios.</text:p>
      <text:h text:style-name="Heading_20_2" text:outline-level="2">Resumen de la Estructura del Proyecto</text:h>
      <text:p text:style-name="Text_20_body">Crearé un repositorio base dentro de la carpeta actual que contenga 3 proyectos distintos y un archivo README principal:</text:p>
      <text:p text:style-name="Text_20_body"><text:span text:style-name="T3">/landing-pages-irisvisual</text:span> ├── <text:span text:style-name="T3">mezcal-admirable/</text:span> (Landing Page Mezcal) ├── <text:span text:style-name="T3">temazcal-tonantzin/</text:span> (Landing Page Temazcal) ├── <text:span text:style-name="T3">iris-visual/</text:span> (Landing Page Producción Audiovisual) └── <text:span text:style-name="T3">README.md</text:span> (Instrucciones de Git, Caddy y Despliegue)</text:p>
      <text:h text:style-name="Heading_20_2" text:outline-level="2">Detalles de las Landing Pages</text:h>
      <text:p text:style-name="Text_20_body">Cada landing page tendrá un formulario de contacto cuyo único propósito es recopilar los datos y redirigir al usuario al WhatsApp de la empresa (generando el mensaje predefinido con los datos ingresados). Todo el código HTML, comentarios y variables estarán en <text:span text:style-name="T4">español</text:span> para facilitar su futura modificación.</text:p>
      <text:h text:style-name="Heading_20_3" text:outline-level="3">1. Mezcal Artesanal Admirable</text:h>
      <text:list text:style-name="L1">
        <text:list-item>
          <text:p text:style-name="P2"><text:span text:style-name="T4">Colores:</text:span> Negros y dorados.</text:p>
        </text:list-item>
        <text:list-item>
          <text:p text:style-name="P2"><text:span text:style-name="T4">Secciones:</text:span> Inicio (Héroe), Proceso de Elaboración Artesanal, Productos/Formato y Formulario de WhatsApp para pedidos.</text:p>
        </text:list-item>
        <text:list-item>
          <text:p text:style-name="P2"><text:span text:style-name="T4">Estilo:</text:span> Elegante, oscuro (dark mode natural), destacando el dorado para un aspecto premium.</text:p>
        </text:list-item>
      </text:list>
      <text:h text:style-name="Heading_20_3" text:outline-level="3" text:is-list-header="true"><text:soft-page-break/>2. Temazcal Tonantzin (Miahuatlán, Oaxaca)</text:h>
      <text:list text:style-name="L2">
        <text:list-item>
          <text:p text:style-name="P3"><text:span text:style-name="T4">Colores:</text:span> Prehispánicos (terracotas, adobe, ocres, verdes oscuros/naturaleza).</text:p>
        </text:list-item>
        <text:list-item>
          <text:p text:style-name="P3"><text:span text:style-name="T4">Secciones:</text:span> Inicio (Héroe relajante), Significado/Historia del Temazcal, Beneficios, y Formulario de WhatsApp para reservas.</text:p>
        </text:list-item>
        <text:list-item>
          <text:p text:style-name="P3"><text:span text:style-name="T4">Estilo:</text:span> Orgánico, terrenal, relajante y espiritual.</text:p>
        </text:list-item>
      </text:list>
      <text:h text:style-name="Heading_20_3" text:outline-level="3" text:is-list-header="true">3. Iris Visual (Producción Audiovisual)</text:h>
      <text:list text:style-name="L3">
        <text:list-item>
          <text:p text:style-name="P4"><text:span text:style-name="T4">Colores:</text:span> Azules (tecnología/confianza) y Naranja (creatividad/energía).</text:p>
        </text:list-item>
        <text:list-item>
          <text:p text:style-name="P4"><text:span text:style-name="T4">Secciones:</text:span> Inicio (Héroe con llamado a la acción), Servicios (Spots, Fotografía, Manejo de Redes), Portafolio/Demostración y Formulario de WhatsApp para contrataciones.</text:p>
        </text:list-item>
        <text:list-item>
          <text:p text:style-name="P4"><text:span text:style-name="T4">Estilo:</text:span> Moderno, dinámico, con un alto contraste entre el azul y el naranja para resaltar la creatividad.</text:p>
        </text:list-item>
      </text:list>
      <text:h text:style-name="Heading_20_2" text:outline-level="2" text:is-list-header="true">Despliegue (VPS 2GB + Caddy + Git)</text:h>
      <text:p text:style-name="Text_20_body">El archivo <text:span text:style-name="T3">README.md</text:span> incluirá un paso a paso claro (en español) sobre:</text:p>
      <text:list text:style-name="L4">
        <text:list-item>
          <text:p text:style-name="P5"><text:span text:style-name="T4">Control de Versiones (Git):</text:span> Cómo subir tu proyecto a GitHub/GitLab y cómo clonarlo en tu VPS de Lightsail.</text:p>
        </text:list-item>
        <text:list-item>
          <text:p text:style-name="P5"><text:span text:style-name="T4">Caddy Web Server:</text:span> Cómo instalar Caddy en tu VPS, y cómo crear el archivo <text:span text:style-name="T3">Caddyfile</text:span> para configurar los subdominios (ej. <text:span text:style-name="T3">mezcal.irisvisual.com</text:span>, <text:span text:style-name="T3">temazcal.irisvisual.com</text:span>, <text:span text:style-name="T3">irisvisual.com</text:span>) con HTTPS automático usando Let's Encrypt.</text:p>
        </text:list-item>
        <text:list-item>
          <text:p text:style-name="P5"><text:span text:style-name="T4">Flujo de Producción:</text:span> Dado que tienes 2GB de RAM, puedes compilar los sitios usando <text:span text:style-name="T3">npm run build</text:span> directamente en el VPS de manera segura (Vite + Tailwind usa poca memoria), o de manera opcional compilar localmente y sólo copiar las carpetas <text:span text:style-name="T3">dist</text:span>. Detallaré como compilar en el VPS tras un git pull por comodidad.</text:p>
        </text:list-item>
      </text:list>
      <text:p text:style-name="Quotations">[!IMPORTANT] <text:span text:style-name="T4">Revisión del Usuario Requerida</text:span></text:p>
      <text:list text:style-name="L5">
        <text:list-item>
          <text:p text:style-name="P6">¿Estás de acuerdo en usar un entorno de <text:span text:style-name="T4">Vite con Vanilla HTML y Tailwind CSS</text:span>? (Es la manera moderna pero más simple, permite modificar directamente el HTML y aprovecha Tailwind al máximo).</text:p>
        </text:list-item>
        <text:list-item>
          <text:p text:style-name="P6">Respecto a los enlaces a WhatsApp: usaré una lógica de JavaScript simple para abrir la URL de <text:span text:style-name="T3">wa.me/NUMERO?text=...</text:span> recabando la info del formulario, ¿tienes algún número provisional para poner, o dejo marcadores genéricos (ej. <text:span text:style-name="T3">+521234567890</text:span>)?</text:p>
        </text:list-item>
        <text:list-item>
          <text:p text:style-name="P6">¿El dominio <text:span text:style-name="T3">irisvisual.com</text:span> ya apunta a la IP de tu servidor Lightsail en los registros DNS de tu proveedor?</text:p>
        </text:list-item>
      </text:list>
      <text:h text:style-name="Heading_20_2" text:outline-level="2" text:is-list-header="true"><text:soft-page-break/>Plan de Ejecución</text:h>
      <text:list text:style-name="L6">
        <text:list-item>
          <text:p text:style-name="P7">Escribir instrucción de despliegue completa en el archivo <text:span text:style-name="T3">README.md</text:span> en el directorio principal.</text:p>
        </text:list-item>
        <text:list-item>
          <text:p text:style-name="P7">Crear carpeta <text:span text:style-name="T3">mezcal-admirable</text:span> y configurar Vite + Tailwind.</text:p>
        </text:list-item>
        <text:list-item>
          <text:p text:style-name="P7">Crear carpeta <text:span text:style-name="T3">temazcal-tonantzin</text:span> y configurar Vite + Tailwind.</text:p>
        </text:list-item>
        <text:list-item>
          <text:p text:style-name="P7">Crear carpeta <text:span text:style-name="T3">iris-visual</text:span> y configurar Vite + Tailwind.</text:p>
        </text:list-item>
        <text:list-item>
          <text:p text:style-name="P7">Desarrollar diseño, contenido y lógica de WhatsApp para cada página.</text:p>
        </text:list-item>
        <text:list-item>
          <text:p text:style-name="P7">Probar compilación (<text:span text:style-name="T3">build</text:span>) de cada proyect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3T00:08:17.858287755</meta:creation-date>
    <dc:date>2026-04-03T00:10:11.186056546</dc:date>
    <meta:editing-duration>PT49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3" meta:paragraph-count="36" meta:word-count="730" meta:character-count="4794" meta:non-whitespace-character-count="4121"/>
  </office:meta>
</office:document-meta>
</file>